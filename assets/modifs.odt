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cm" fo:margin-right="0cm" fo:text-indent="0cm" style:auto-text-indent="false"/>
    </style:style>
    <style:style style:name="P2" style:family="paragraph" style:parent-style-name="Heading_20_3">
      <style:paragraph-properties fo:margin-left="0cm" fo:margin-right="0cm" fo:text-indent="0cm" style:auto-text-indent="false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T1" style:family="text">
      <style:text-properties officeooo:rsid="0017598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 text:name="le-lieu-recherch"/>Le lieu recherché</text:h>
      <text:p text:style-name="Text_20_body">Nous cherchons un local d’environ 80 m² à Nancy ou dans la Métropole du Grand Nancy, de quoi aménager un espace café-pâtisserie, un coin rencontre et une petite cuisine. Vous connaissez un local disponible ? Parlez-nous-en. 🔑</text:p>
      <text:h text:style-name="P1" text:outline-level="2"><text:bookmark text:name="le-modle-conomique"/>Le modèle économique</text:h>
      <text:h text:style-name="P2" text:outline-level="3"><text:bookmark text:name="trois-sources"/>Trois sources</text:h>
      <text:p text:style-name="Text_20_body">Ce lieu fonctionne comme une entreprise sociale : le but n’est pas d’enrichir un propriétaire, mais de faire vivre les gens. Il s’appuie sur <text:span text:style-name="Strong_20_Emphasis">trois sources</text:span> :</text:p>
      <text:list text:style-name="L1">
        <text:list-item>
          <text:p text:style-name="P4"><text:span text:style-name="Strong_20_Emphasis">ce qu’on vend </text:span>: <text:span text:style-name="T1">les</text:span> cafés, <text:span text:style-name="T1">les </text:span>pâtisseries, <text:span text:style-name="T1">le t</text:span>raiteur ; </text:p>
        </text:list-item>
        <text:list-item>
          <text:p text:style-name="P4"><text:span text:style-name="Strong_20_Emphasis">le soutien de la puissance publique</text:span> pour l’emploi et la formation des personnes éloignées de l’emploi ; </text:p>
        </text:list-item>
        <text:list-item>
          <text:p text:style-name="P3"><text:span text:style-name="Strong_20_Emphasis">le soutien</text:span> des collectivités, des fondations, etc. </text:p>
        </text:list-item>
      </text:list>
      <text:h text:style-name="P2" text:outline-level="3"><text:bookmark text:name="trois-repres"/>Trois repères</text:h>
      <text:list text:style-name="L2">
        <text:list-item>
          <text:p text:style-name="P6">un café ≈ <text:span text:style-name="Strong_20_Emphasis">2 €</text:span>, une pâtisserie ≈ <text:span text:style-name="Strong_20_Emphasis">4 €</text:span> ; </text:p>
        </text:list-item>
        <text:list-item>
          <text:p text:style-name="P6">une personne y est payée au moins au SMIC, ≈ <text:span text:style-name="Strong_20_Emphasis">1 400 € net/mois</text:span> ; </text:p>
        </text:list-item>
        <text:list-item>
          <text:p text:style-name="P5">pour chaque personne en formation-emploi, les aides publiques à l’emploi représentent ≈ <text:span text:style-name="Strong_20_Emphasis">13 300 €/an</text:span>. 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4T15:56:28.040667890</meta:creation-date>
    <dc:date>2026-06-14T15:57:40.740068320</dc:date>
    <meta:editing-duration>PT1M14S</meta:editing-duration>
    <meta:editing-cycles>1</meta:editing-cycles>
    <meta:document-statistic meta:table-count="0" meta:image-count="0" meta:object-count="0" meta:page-count="1" meta:paragraph-count="12" meta:word-count="157" meta:character-count="866" meta:non-whitespace-character-count="722"/>
    <meta:generator>LibreOffice/24.2.7.2$Linux_X86_64 LibreOffice_project/420$Build-2</meta:generator>
  </office:meta>
</office:document-meta>
</file>